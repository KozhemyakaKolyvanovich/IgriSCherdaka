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pitch="variable"/>
    <style:font-face style:name="Liberation Mono" svg:font-family="'Liberation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Создал шорткод <text:span text:style-name="Source_20_Text">[приветствие]</text:span>. Вставляется в любую страницу или виджет, выводит фразу с текущей датой. Дата берётся с сервера через встроенную функцию PHP.</text:p>
        </text:list-item>
        <text:list-item>
          <text:p text:style-name="P1">Функция сброса настроек демо-контента уже была в теме. Я проверил — она чистит только настройки кастомайзера (баннер, кнопки, картинки секции «о нас»), но не удаляет страницы и посты. Это нормально, так и задумано.</text:p>
        </text:list-item>
      </text:list>
      <text:p text:style-name="Text_20_body"><text:span text:style-name="Strong_20_Emphasis">С чем разобрался в процессе:</text:span></text:p>
      <text:list text:style-name="L2">
        <text:list-item>
          <text:p text:style-name="P2">Как регистрируются сайдбары и меню.</text:p>
        </text:list-item>
        <text:list-item>
          <text:p text:style-name="P2">Как подключаются стили и скрипты в зависимости от режима (с .min или без).</text:p>
        </text:list-item>
        <text:list-item>
          <text:p text:style-name="P2">Как работает динамическое количество колонок футера через get_theme_mod.</text:p>
        </text:list-item>
        <text:list-item>
          <text:p text:style-name="P2">Как меняется число товаров на странице и колонок в WooCommerce.</text:p>
        </text:list-item>
      </text:list>
      <text:p text:style-name="Text_20_body"><text:span text:style-name="Strong_20_Emphasis">Итог:</text:span><text:line-break/>Задача выполнена. Шорткод работает, тему не сломал. Основной код темы оставил без изменений, все дополнения добавил в конец functions.php.</text:p>
      <text:p text:style-name="Standard"/>
      <text:p text:style-name="Text_20_body">По итогу в код темы (файл <text:span text:style-name="Source_20_Text">functions.php</text:span>) ты добавил <text:span text:style-name="Strong_20_Emphasis">один новый блок</text:span> — в самый конец файла, перед закрывающим <text:span text:style-name="Source_20_Text">?&gt;</text:span>:</text:p>
      <text:p text:style-name="Text_20_body"><text:span text:style-name="Strong_20_Emphasis">Шорткод </text:span><text:span text:style-name="Strong_20_Emphasis"><text:span text:style-name="Source_20_Text">[приветствие]</text:span></text:span></text:p>
      <text:p text:style-name="Text_20_body">Конкретно этот кусок:</text:p>
      <text:p text:style-name="Standard">/**</text:p>
      <text:p text:style-name="Standard"><text:s/>* Показывает приветствие с текущей датой</text:p>
      <text:p text:style-name="Standard"><text:s/>* Используется как шорткод: [приветствие]</text:p>
      <text:p text:style-name="Standard"><text:s/>*</text:p>
      <text:p text:style-name="Standard"><text:s/>* @return string HTML со строкой приветствия</text:p>
      <text:p text:style-name="Standard"><text:s/>*/</text:p>
      <text:p text:style-name="Standard">function privetstvie() {</text:p>
      <text:p text:style-name="Standard"><text:s text:c="4"/>$segodnya = date('d.m.Y');</text:p>
      <text:p text:style-name="Standard"><text:s text:c="4"/>return '&lt;p&gt;Добро пожаловать! Сегодня ' . $segodnya . '&lt;/p&gt;';</text:p>
      <text:p text:style-name="Standard">}</text:p>
      <text:p text:style-name="Standard">add_shortcode( 'приветствие', 'privetstvie' )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pitch="variable"/>
    <style:font-face style:name="Liberation Mono" svg:font-family="'Liberation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  <meta:initial-creator>Scott Templer</meta:initial-creator>
    <meta:creation-date>2006-05-16T10:26:40</meta:creation-date>
    <dc:language>en-US</dc:language>
    <meta:editing-cycles>2</meta:editing-cycles>
    <meta:editing-duration>PT56S</meta:editing-duration>
    <dc:date>2026-05-05T14:23:45.061221213</dc:date>
    <meta:document-statistic meta:table-count="0" meta:image-count="0" meta:object-count="0" meta:page-count="1" meta:paragraph-count="22" meta:word-count="186" meta:character-count="1245" meta:non-whitespace-character-count="1072"/>
    <meta:user-defined meta:name="Info 1"/>
    <meta:user-defined meta:name="Info 2"/>
    <meta:user-defined meta:name="Info 3"/>
    <meta:user-defined meta:name="Info 4"/>
  </office:meta>
</office:document-meta>
</file>